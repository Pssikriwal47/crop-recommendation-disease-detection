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4E000001B0BF2304C067D065B7.png" manifest:media-type="image/png"/>
  <manifest:file-entry manifest:full-path="Pictures/100000010000046200000319A634A927ACA64AEE.png" manifest:media-type="image/png"/>
  <manifest:file-entry manifest:full-path="Pictures/10000001000004200000033013D3DEA2751B99B9.png" manifest:media-type="image/png"/>
  <manifest:file-entry manifest:full-path="Pictures/10000001000004B0000004B0977ECF284F6D3AA6.png" manifest:media-type="image/png"/>
  <manifest:file-entry manifest:full-path="Pictures/1001254600018C000001320026A969509AD534A2.pdf" manifest:media-type="application/pdf"/>
  <manifest:file-entry manifest:full-path="Pictures/10000001000005DC000003848CF50268E079E9E1.png" manifest:media-type="image/png"/>
  <manifest:file-entry manifest:full-path="Pictures/100000010000054600000465DB969D7875A8F840.png" manifest:media-type="image/png"/>
  <manifest:file-entry manifest:full-path="Pictures/1000000100000546000002EE173091E9DFB7912E.png" manifest:media-type="image/png"/>
  <manifest:file-entry manifest:full-path="Pictures/1000000100000384000002EE125ED7663EA0A060.png" manifest:media-type="image/png"/>
  <manifest:file-entry manifest:full-path="Pictures/1000000100000546000002EEC1506DFEF37F1792.png" manifest:media-type="image/png"/>
  <manifest:file-entry manifest:full-path="Pictures/10000000000001380000019891B9A1F767CEF833.jpg" manifest:media-type="image/jpeg"/>
  <manifest:file-entry manifest:full-path="Pictures/10005C740001A4C00001296000E5BD2F2AF88E82.pdf" manifest:media-type="application/pdf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ECTION_5f_HEADER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ECTION_5f_HEADER-notes">
      <style:graphic-properties draw:fill-color="#ffffff" fo:min-height="13.364cm"/>
      <style:paragraph-properties style:writing-mode="lr-tb"/>
    </style:style>
    <style:style style:name="pr4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735cm" style:use-optimal-column-width="false"/>
    </style:style>
    <style:style style:name="co2" style:family="table-column">
      <style:table-column-properties style:column-width="6.787cm" style:use-optimal-column-width="false"/>
    </style:style>
    <style:style style:name="ro1" style:family="table-row">
      <style:table-row-properties style:row-height="2.703cm" style:use-optimal-row-height="false"/>
    </style:style>
    <style:style style:name="ro2" style:family="table-row">
      <style:table-row-properties style:row-height="3.316cm" style:use-optimal-row-height="false"/>
    </style:style>
    <style:style style:name="ce1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eef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1.27cm" fo:margin-right="0cm" fo:margin-top="0.353cm" fo:margin-bottom="0cm" fo:line-height="90%" fo:text-align="center" fo:text-indent="-0.635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57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5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62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62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6pt" fo:letter-spacing="normal" fo:language="en" fo:country="US" fo:font-style="normal" style:text-underline-style="none" fo:font-weight="bold" fo:background-color="transparent" style:font-name-asian="Calibri1" style:font-size-asian="66pt" style:font-style-asian="normal" style:font-weight-asian="bold" style:font-name-complex="Calibri1" style:font-size-complex="6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0pt" fo:letter-spacing="normal" fo:language="en" fo:country="IN" fo:font-style="normal" style:text-underline-style="none" fo:font-weight="bold" fo:background-color="transparent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T3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bold" fo:background-color="transparent" style:font-name-asian="Calibri1" style:font-size-asian="24pt" style:font-style-asian="italic" style:font-weight-asian="bold" style:font-name-complex="Calibri1" style:font-size-complex="24pt" style:font-style-complex="italic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font-style="normal" style:text-underline-style="none" fo:font-weight="normal" fo:background-color="transparent" style:font-name-asian="Times New Roman1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T5" style:family="text">
      <style:text-properties fo:font-variant="normal" fo:text-transform="none" fo:color="#002060" loext:opacity="100%" style:text-line-through-style="none" style:text-line-through-type="none" style:text-position="0% 100%" style:font-name="Times New Roman1" fo:font-size="32pt" fo:letter-spacing="normal" fo:font-style="normal" style:text-underline-style="none" fo:font-weight="bold" fo:background-color="transparent" style:font-name-asian="Times New Roman1" style:font-size-asian="32pt" style:font-style-asian="normal" style:font-weight-asian="bold" style:font-name-complex="Times New Roman1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Calibr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2060" loext:opacity="100%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bold" fo:background-color="transparent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9" style:family="text">
      <style:text-properties fo:font-variant="normal" fo:text-transform="none" fo:color="#2b3541" loext:opacity="100%" style:text-line-through-style="none" style:text-line-through-type="none" style:text-position="0% 100%" style:font-name="Times New Roman1" fo:font-size="18.5pt" fo:letter-spacing="normal" fo:language="en" fo:country="US" fo:font-style="normal" style:text-underline-style="none" fo:font-weight="normal" fo:background-color="transparent" style:font-name-asian="Times New Roman1" style:font-size-asian="18.5pt" style:font-style-asian="normal" style:font-weight-asian="normal" style:font-name-complex="Times New Roman1" style:font-size-complex="18.5pt" style:font-style-complex="normal" style:font-weight-complex="normal"/>
    </style:style>
    <style:style style:name="T20" style:family="text">
      <style:text-properties fo:font-variant="normal" fo:text-transform="none" fo:color="#2b3541" loext:opacity="100%" style:text-line-through-style="none" style:text-line-through-type="none" style:text-position="0% 100%" style:font-name="Times New Roman1" fo:font-size="18.5pt" fo:letter-spacing="normal" fo:language="en" fo:country="US" fo:font-style="normal" style:text-underline-style="none" fo:font-weight="bold" fo:background-color="transparent" style:font-name-asian="Times New Roman1" style:font-size-asian="18.5pt" style:font-style-asian="normal" style:font-weight-asian="bold" style:font-name-complex="Times New Roman1" style:font-size-complex="18.5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.5pt" fo:letter-spacing="normal" fo:language="en" fo:country="US" fo:font-style="normal" style:text-underline-style="none" fo:font-weight="normal" fo:background-color="transparent" style:font-name-asian="Times New Roman1" style:font-size-asian="18.5pt" style:font-style-asian="normal" style:font-weight-asian="normal" style:font-name-complex="Times New Roman1" style:font-size-complex="18.5pt" style:font-style-complex="normal" style:font-weight-complex="normal"/>
    </style:style>
    <style:style style:name="T22" style:family="text">
      <style:text-properties fo:font-variant="normal" fo:text-transform="none" fo:color="#2b3541" loext:opacity="100%" style:text-line-through-style="none" style:text-line-through-type="none" style:text-position="0% 100%" style:font-name="Arial1" fo:font-size="18.5pt" fo:letter-spacing="normal" fo:language="en" fo:country="US" fo:font-style="normal" style:text-underline-style="none" fo:font-weight="normal" fo:background-color="transparent" style:font-name-asian="Arial1" style:font-size-asian="18.5pt" style:font-style-asian="normal" style:font-weight-asian="normal" style:font-name-complex="Arial1" style:font-size-complex="18.5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88888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style:font-name="Arial1" fo:color="#051d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51d3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2b35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2b35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BM University Engagement Project Submission&#10;" draw:style-name="dp1" draw:master-page-name="SECTION_5f_HEADER">
        <draw:frame draw:name="Title 1" presentation:style-name="pr1" draw:text-style-name="P2" draw:layer="layout" svg:width="29.209cm" svg:height="7.923cm" svg:x="2.311cm" svg:y="4.749cm" presentation:class="title" presentation:user-transformed="true">
          <draw:text-box>
            <text:p text:style-name="P1"><text:span text:style-name="T1">IBM University </text:span><text:span text:style-name="T1">Engagement </text:span><text:span text:style-name="T1">Project </text:span><text:span text:style-name="T1">Submission</text:span><text:span text:style-name="T2"><text:line-break/></text:span><text:span text:style-name="T2"/></text:p>
          </draw:text-box>
        </draw:frame>
        <draw:frame draw:name="Text Placeholder 2" presentation:style-name="pr2" draw:text-style-name="P4" draw:layer="layout" svg:width="29.209cm" svg:height="4.166cm" svg:x="2.819cm" svg:y="10.844cm" presentation:class="outline" presentation:user-transformed="true">
          <draw:text-box>
            <text:p text:style-name="P3"><text:span text:style-name="T3">“</text:span><text:span text:style-name="T3">Exploring the Power of Machine Learning with IBM </text:span><text:span text:style-name="T3">Cloud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BJECT" presentation:presentation-page-layout-name="AL1T11">
        <draw:custom-shape draw:name="Google Shape;92;p2" draw:style-name="gr2" draw:text-style-name="P7" draw:layer="layout" svg:width="29.987cm" svg:height="0.552cm" svg:x="1.918cm" svg:y="12.293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2" draw:style-name="gr3" draw:text-style-name="P9" draw:layer="layout" svg:width="20.628cm" svg:height="1.253cm" svg:x="3.062cm" svg:y="3.263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2" draw:style-name="standard" draw:layer="layout" svg:width="26.095cm" svg:height="6.018cm" svg:x="3.609cm" svg:y="7.22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0"><text:span text:style-name="T6">Student Name</text:span></text:p>
              </table:table-cell>
              <table:table-cell>
                <text:p text:style-name="P10"><text:span text:style-name="T6">Recent Passport Photo</text:span></text:p>
              </table:table-cell>
              <table:table-cell>
                <text:p text:style-name="P10"><text:span text:style-name="T7">Email ID </text:span></text:p>
              </table:table-cell>
              <table:table-cell>
                <text:p text:style-name="P10"><text:span text:style-name="T7">Mobile number</text:span></text:p>
                <text:p text:style-name="P10"><text:span text:style-name="T7">[WhatsApp] 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98;p2" draw:style-name="gr4" draw:text-style-name="P11" draw:layer="layout" svg:width="2.117cm" svg:height="2.226cm" svg:x="11.258cm" svg:y="10.384cm">
          <draw:image xlink:href="Pictures/10000000000001380000019891B9A1F767CEF833.jpg" xlink:type="simple" xlink:show="embed" xlink:actuate="onLoad" draw:mime-type="image/jpeg">
            <text:p/>
          </draw:image>
        </draw:frame>
        <draw:custom-shape draw:name="TextBox 3" draw:style-name="gr5" draw:text-style-name="P13" draw:layer="layout" svg:width="28.555cm" svg:height="1.265cm" svg:x="3.35cm" svg:y="4.058cm">
          <text:p text:style-name="P12"><text:span text:style-name="T8">Domain of <text:s/>Project – Agricul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13" draw:layer="layout" svg:width="26.613cm" svg:height="2.281cm" svg:x="3.35cm" svg:y="1.533cm">
          <text:p text:style-name="P12"><text:span text:style-name="T8">Project Tile – </text:span><text:span text:style-name="T9">Crop Recommendation and Crop Disease Detection using Machine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3" draw:layer="layout" svg:width="17.934cm" svg:height="4.488cm" svg:x="3.364cm" svg:y="14.474cm">
          <text:p text:style-name="P14"><text:span text:style-name="T10">Recommended font style and size:</text:span><text:span text:style-name="T10"><text:line-break/></text:span><text:span text:style-name="T11"><text:line-break/></text:span><text:span text:style-name="T10">Font Style: Arial</text:span><text:span text:style-name="T10"><text:line-break/></text:span><text:span text:style-name="T10">Font Size (Heading): 28</text:span></text:p>
          <text:p text:style-name="P14"><text:span text:style-name="T10">Font Size (Content): 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88;p2:notes" presentation:style-name="pr4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9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OBJECT" presentation:presentation-page-layout-name="AL1T11">
        <draw:custom-shape draw:name="TextBox 1" draw:style-name="gr8" draw:text-style-name="P13" draw:layer="layout" svg:width="31.549cm" svg:height="17.397cm" svg:x="1.413cm" svg:y="2.402cm">
          <text:p text:style-name="P12"><text:span text:style-name="T12">Problem Statement: Crop Recommendation and Crop Disease Detection using Machine Learning</text:span></text:p>
          <text:p text:style-name="P16"><text:span text:style-name="T11">Indian agriculture is highly dependent on selecting the right crop for a field's soil and climate conditions, and on detecting crop diseases early enough to act. Farmers often rely on experience or generic advice rather than data-driven analysis of soil nutrients (Nitrogen, Phosphorus, Potassium), temperature, humidity, pH, and rainfall — leading to suboptimal yields. Separately, crop diseases such as leaf blight and leaf rust are frequently identified late, by visual inspection alone, causing avoidable yield loss. This is a time-sensitive and consequential challenge. Your task is to design, build, and evaluate (1) a multi-class classification model that recommends the most suitable crop for a given set of soil and climate parameters, and (2) an image-based classification model that detects whether a crop leaf is healthy or affected by a specific disease. Together these form a decision-support tool that can help farmers and agricultural extension workers make faster, more accurate decisions, improving yield and reducing crop loss.</text:span></text:p>
          <text:p text:style-name="P1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" draw:text-style-name="P13" draw:layer="layout" svg:width="20.04cm" svg:height="1.265cm" svg:x="0.978cm" svg:y="1.115cm">
          <text:p text:style-name="P12"><text:span text:style-name="T8">Problem Statement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01;p3:notes" presentation:style-name="pr5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2;p3:notes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OBJECT" presentation:presentation-page-layout-name="AL1T11">
        <draw:custom-shape draw:name="TextBox 1" draw:style-name="gr10" draw:text-style-name="P17" draw:layer="layout" svg:width="30.919cm" svg:height="15.493cm" svg:x="1.455cm" svg:y="1.874cm">
          <text:p text:style-name="P16"><text:span text:style-name="T12"><text:s/></text:span><text:span text:style-name="T12">(IBM watsonx.ai Studio – AutoAI):</text:span></text:p>
          <text:p text:style-name="P16"><text:span text:style-name="T11">We propose an AI-powered Crop Advisory System using </text:span><text:span text:style-name="T12">IBM watsonx.ai Studio</text:span><text:span text:style-name="T11"> and </text:span><text:span text:style-name="T12">AutoAI</text:span><text:span text:style-name="T11">.</text:span><text:span text:style-name="T11"><text:line-break/></text:span><text:span text:style-name="T11"> Soil and climate data (Nitrogen, Phosphorus, Potassium, temperature, humidity, pH, rainfall) is uploaded to watsonx.ai for the crop recommendation model.</text:span><text:span text:style-name="T11"><text:line-break/></text:span><text:span text:style-name="T11"> </text:span><text:span text:style-name="T12">AutoAI</text:span><text:span text:style-name="T11"> will automatically perform data preprocessing, feature engineering, algorithm selection, and hyperparameter optimization across multiple candidate pipelines.</text:span><text:span text:style-name="T11"><text:line-break/></text:span><text:span text:style-name="T11"> Multiple classification models are generated and evaluated on a leaderboard, and the best-performing pipeline is selected and further tuned for crop recommendation.</text:span><text:span text:style-name="T11"><text:line-break/></text:span><text:span text:style-name="T11"> In parallel, a crop-disease detection module extracts visual features from leaf images and classifies them as Healthy, Blight, or Rust, giving farmers an early warning before disease spreads.</text:span><text:span text:style-name="T11"><text:line-break/></text:span><text:span text:style-name="T1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3" draw:layer="layout" svg:width="20.04cm" svg:height="1.265cm" svg:x="0.44cm" svg:y="0.564cm">
          <text:p text:style-name="P12"><text:span text:style-name="T8">Proposed Solution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01;p3:notes" presentation:style-name="pr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2;p3:notes" draw:style-name="gr1" draw:layer="layout" svg:width="16.932cm" svg:height="9.524cm" svg:x="1.058cm" svg:y="1.905cm" draw:page-number="4" presentation:class="page"/>
        </presentation:notes>
      </draw:page>
      <draw:page draw:name="page5" draw:style-name="dp1" draw:master-page-name="OBJECT" presentation:presentation-page-layout-name="AL1T11">
        <draw:custom-shape draw:name="TextBox 1" draw:style-name="gr12" draw:text-style-name="P13" draw:layer="layout" svg:width="19.786cm" svg:height="1.269cm" svg:x="2.159cm" svg:y="1.346cm">
          <text:p text:style-name="P12"><text:span text:style-name="T8">Technology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3" draw:layer="layout" svg:width="29.209cm" svg:height="12.105cm" svg:x="2.159cm" svg:y="3.353cm">
          <text:p text:style-name="P12"><text:span text:style-name="T6"/></text:p>
          <text:list text:style-name="L10">
            <text:list-item>
              <text:p text:style-name="P12"><text:span text:style-name="T14">IBM Cloud </text:span><text:span text:style-name="T6">– It provides the infrastructure to build, deploy, and scale the Crop Advisory system efficiently. IBM Cloud enables a </text:span><text:span text:style-name="T14">reliable, secure, and scalable environment</text:span><text:span text:style-name="T6"> for deploying the Crop Advisory agent</text:span></text:p>
            </text:list-item>
          </text:list>
          <text:p text:style-name="P12"><text:span text:style-name="T6"/></text:p>
          <text:list text:continue-numbering="true" text:style-name="L10">
            <text:list-item>
              <text:p text:style-name="P12"><text:span text:style-name="T6">ML Algorithm/ Model Used: Random Forest (tuned, GridSearchCV) — Crop Recommendation; Random Forest (image-feature based) — Crop Disease Detection</text:span></text:p>
            </text:list-item>
            <text:list-item>
              <text:p text:style-name="P12"><text:span text:style-name="T6">Accuracy Obtained: 95.2% (Crop Recommendation, 12 classes); 88.9% (Crop Disease Detection, 3 classes)</text:span></text:p>
            </text:list-item>
            <text:list-item>
              <text:p text:style-name="P12"><text:span text:style-name="T6">Enhancements and Hyperparameter tuning: GridSearchCV over n_estimators, max_depth, min_samples_split (Crop Recommendation); color-ratio &amp; texture feature engineering (Disease Detection)</text:span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98;p10:notes" presentation:style-name="pr7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9;p10:notes" draw:style-name="gr1" draw:layer="layout" svg:width="16.932cm" svg:height="9.524cm" svg:x="1.058cm" svg:y="1.905cm" draw:page-number="5" presentation:class="page"/>
        </presentation:notes>
      </draw:page>
      <draw:page draw:name="page6" draw:style-name="dp1" draw:master-page-name="OBJECT" presentation:presentation-page-layout-name="AL1T11">
        <draw:custom-shape draw:name="Google Shape;135;p5" draw:style-name="gr14" draw:text-style-name="P13" draw:layer="layout" svg:width="16.413cm" svg:height="1.245cm" svg:x="1.493cm" svg:y="0.898cm">
          <text:p text:style-name="P12"><text:span text:style-name="T8">Training Screenshots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1" draw:layer="layout" svg:width="28.86cm" svg:height="16.033cm" svg:x="2.503cm" svg:y="2.124cm">
          <draw:image xlink:href="Pictures/1000000100000546000002EE173091E9DFB7912E.png" xlink:type="simple" xlink:show="embed" xlink:actuate="onLoad" draw:mime-type="image/png">
            <text:p/>
          </draw:image>
          <svg:desc>A screen shot of a graph

AI-generated content may be incorrect.</svg:desc>
        </draw:frame>
        <presentation:notes draw:style-name="dp3">
          <draw:frame draw:name="Google Shape;171;p7:notes" presentation:style-name="pr8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p7:notes" draw:style-name="gr1" draw:layer="layout" svg:width="16.932cm" svg:height="9.524cm" svg:x="1.058cm" svg:y="1.905cm" draw:page-number="6" presentation:class="page"/>
        </presentation:notes>
      </draw:page>
      <draw:page draw:name="page7" draw:style-name="dp1" draw:master-page-name="OBJECT" presentation:presentation-page-layout-name="AL1T11">
        <draw:custom-shape draw:name="Google Shape;135;p5" draw:style-name="gr15" draw:text-style-name="P13" draw:layer="layout" svg:width="16.413cm" svg:height="1.245cm" svg:x="1.493cm" svg:y="0.898cm">
          <text:p text:style-name="P12"><text:span text:style-name="T15">Best Model Screensho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" draw:text-style-name="P11" draw:layer="layout" svg:width="18.795cm" svg:height="15.662cm" svg:x="6.946cm" svg:y="2.417cm">
          <draw:image xlink:href="Pictures/100000010000054600000465DB969D7875A8F840.png" xlink:type="simple" xlink:show="embed" xlink:actuate="onLoad" draw:mime-type="image/png">
            <text:p/>
          </draw:image>
          <svg:desc>A screenshot of a computer

AI-generated content may be incorrect.</svg:desc>
        </draw:frame>
        <presentation:notes draw:style-name="dp3">
          <draw:frame draw:name="Google Shape;171;p7:notes" presentation:style-name="pr9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p7:notes" draw:style-name="gr1" draw:layer="layout" svg:width="16.932cm" svg:height="9.524cm" svg:x="1.058cm" svg:y="1.905cm" draw:page-number="7" presentation:class="page"/>
        </presentation:notes>
      </draw:page>
      <draw:page draw:name="page8" draw:style-name="dp1" draw:master-page-name="OBJECT" presentation:presentation-page-layout-name="AL1T11">
        <draw:custom-shape draw:name="Google Shape;135;p5" draw:style-name="gr16" draw:text-style-name="P13" draw:layer="layout" svg:width="16.413cm" svg:height="1.245cm" svg:x="1.493cm" svg:y="0.898cm">
          <text:p text:style-name="P12"><text:span text:style-name="T15">Testing Screensho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11" draw:layer="layout" svg:width="25.621cm" svg:height="14.234cm" svg:x="4.122cm" svg:y="2.408cm">
          <draw:image xlink:href="Pictures/1000000100000546000002EEC1506DFEF37F1792.png" xlink:type="simple" xlink:show="embed" xlink:actuate="onLoad" draw:mime-type="image/png">
            <text:p/>
          </draw:image>
          <svg:desc>A screen shot of a computer

AI-generated content may be incorrect.</svg:desc>
        </draw:frame>
        <presentation:notes draw:style-name="dp3">
          <draw:frame draw:name="Google Shape;171;p7:notes" presentation:style-name="pr10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p7:notes" draw:style-name="gr1" draw:layer="layout" svg:width="16.932cm" svg:height="9.524cm" svg:x="1.058cm" svg:y="1.905cm" draw:page-number="8" presentation:class="page"/>
        </presentation:notes>
      </draw:page>
      <draw:page draw:name="page9" draw:style-name="dp1" draw:master-page-name="SECTION_5f_HEADER">
        <draw:custom-shape draw:name="TextBox 4" draw:style-name="gr17" draw:text-style-name="P13" draw:layer="layout" svg:width="7.823cm" svg:height="2.877cm" svg:x="1.152cm" svg:y="0.576cm">
          <text:p text:style-name="P14"><text:span text:style-name="T16">Testing Screensho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1" draw:layer="layout" svg:width="25.675cm" svg:height="15.404cm" svg:x="4.096cm" svg:y="2.465cm">
          <draw:image xlink:href="Pictures/10000001000005DC000003848CF50268E079E9E1.png" xlink:type="simple" xlink:show="embed" xlink:actuate="onLoad" draw:mime-type="image/png">
            <text:p/>
          </draw:image>
          <svg:desc>A screenshot of a computer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ECTION_5f_HEADER">
        <draw:custom-shape draw:name="TextBox 4" draw:style-name="gr18" draw:text-style-name="P13" draw:layer="layout" svg:width="7.823cm" svg:height="3.893cm" svg:x="1.152cm" svg:y="0.576cm">
          <text:p text:style-name="P14"><text:span text:style-name="T16">Crop Disease Detection – Model Resul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1" draw:layer="layout" svg:width="18.486cm" svg:height="15.404cm" svg:x="7.691cm" svg:y="2.465cm">
          <draw:image xlink:href="Pictures/1000000100000384000002EE125ED7663EA0A060.png" xlink:type="simple" xlink:show="embed" xlink:actuate="onLoad" draw:mime-type="image/png">
            <text:p/>
          </draw:image>
          <svg:desc>A screenshot of a computer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ECTION_5f_HEADER">
        <draw:custom-shape draw:name="TextBox 4" draw:style-name="gr19" draw:text-style-name="P13" draw:layer="layout" svg:width="7.823cm" svg:height="4.909cm" svg:x="1.152cm" svg:y="0.576cm">
          <text:p text:style-name="P14"><text:span text:style-name="T16">Crop Disease Detection – Sample Predi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1" draw:layer="layout" svg:width="15.404cm" svg:height="15.404cm" svg:x="9.231cm" svg:y="2.465cm">
          <draw:image xlink:href="Pictures/10000001000004B0000004B0977ECF284F6D3AA6.png" xlink:type="simple" xlink:show="embed" xlink:actuate="onLoad" draw:mime-type="image/png">
            <text:p/>
          </draw:image>
          <svg:desc>A screenshot of a computer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BJECT" presentation:presentation-page-layout-name="AL1T11">
        <draw:custom-shape draw:name="TextBox 1" draw:style-name="gr20" draw:text-style-name="P13" draw:layer="layout" svg:width="19.786cm" svg:height="1.265cm" svg:x="2.159cm" svg:y="1.346cm">
          <text:p text:style-name="P12"><text:span text:style-name="T8">Novelty and Unique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1" draw:text-style-name="P13" draw:layer="layout" svg:width="29.915cm" svg:height="8.635cm" svg:x="2.159cm" svg:y="3.353cm">
          <text:list text:style-name="L11">
            <text:list-item>
              <text:p text:style-name="P12"><text:span text:style-name="T17">The solution combines soil/climate-based crop recommendation with image-based disease detection in a single advisory pipeline. </text:span></text:p>
            </text:list-item>
            <text:list-item>
              <text:p text:style-name="P12"><text:span text:style-name="T17">It uses </text:span><text:span text:style-name="T18">IBM watsonx.ai AutoAI</text:span><text:span text:style-name="T17"> to automatically discover the best machine learning pipeline via a multi-model leaderboard, without extensive manual coding. </text:span></text:p>
            </text:list-item>
            <text:list-item>
              <text:p text:style-name="P12"><text:span text:style-name="T17">The system accurately recommends among 12 crop types and detects 3 leaf-health conditions through a single intelligent platform. </text:span></text:p>
            </text:list-item>
            <text:list-item>
              <text:p text:style-name="P12"><text:span text:style-name="T17">Automated feature engineering helps identify hidden patterns in soil-nutrient, climate, and leaf-image data. </text:span></text:p>
            </text:list-item>
            <text:list-item>
              <text:p text:style-name="P12"><text:span text:style-name="T17">The model ensures consistent, unbiased crop and disease recommendations, minimizing reliance on ad-hoc farmer experience alon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98;p10:notes" presentation:style-name="pr1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9;p10:notes" draw:style-name="gr1" draw:layer="layout" svg:width="16.932cm" svg:height="9.524cm" svg:x="1.058cm" svg:y="1.905cm" draw:page-number="12" presentation:class="page"/>
        </presentation:notes>
      </draw:page>
      <draw:page draw:name="page13" draw:style-name="dp1" draw:master-page-name="OBJECT" presentation:presentation-page-layout-name="AL1T11">
        <draw:custom-shape draw:name="Google Shape;278;p18" draw:style-name="gr22" draw:text-style-name="P19" draw:layer="layout" svg:width="17.9cm" svg:height="1.955cm" svg:x="3.385cm" svg:y="1.169cm">
          <text:p text:style-name="P18"><text:span text:style-name="T8">Git Hub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8" draw:style-name="gr23" draw:text-style-name="P21" draw:layer="layout" svg:width="25.595cm" svg:height="11.88cm" svg:x="3.385cm" svg:y="3.205cm">
          <text:p text:style-name="P20"><text:span text:style-name="T19">Please create public github repository (Enable Add README <text:s/>button while creating repository) with format – </text:span></text:p>
          <text:p text:style-name="P20"><text:span text:style-name="T19">Please test and Paste the working <text:s/>Github URL –</text:span></text:p>
          <text:p text:style-name="P20"><text:span text:style-name="T20">Make sure you have Uploaded following three files into your github repository <text:s/></text:span><text:span text:style-name="T21"><text:line-break/></text:span><text:span text:style-name="T19">1) Data.csv file, 2) Problem_Statement.pdf file <text:s/>3) your project presentation .pptx file 4) Crop_ML_Project.ipynb (Jupyter Noteboo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8" draw:style-name="gr24" draw:text-style-name="P21" draw:layer="layout" svg:width="20.745cm" svg:height="2.127cm" svg:x="3.385cm" svg:y="9.334cm">
          <text:p text:style-name="P20"><text:span text:style-name="T19">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18" draw:style-name="gr25" draw:text-style-name="P21" draw:layer="layout" svg:width="20.745cm" svg:height="2.127cm" svg:x="3.385cm" svg:y="12.21cm">
          <text:p text:style-name="P20"><text:span text:style-name="T19">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18" draw:style-name="gr26" draw:text-style-name="P21" draw:layer="layout" svg:width="20.745cm" svg:height="1.063cm" svg:x="3.385cm" svg:y="15.085cm">
          <text:p text:style-name="P20"><text:span text:style-name="T19">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72;p18:notes" presentation:style-name="pr1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3;p18:notes" draw:style-name="gr1" draw:layer="layout" svg:width="16.932cm" svg:height="9.524cm" svg:x="1.058cm" svg:y="1.905cm" draw:page-number="13" presentation:class="page"/>
        </presentation:notes>
      </draw:page>
      <draw:page draw:name="page14" draw:style-name="dp1" draw:master-page-name="OBJECT" presentation:presentation-page-layout-name="AL1T11">
        <draw:custom-shape draw:name="Google Shape;278;p18" draw:style-name="gr27" draw:text-style-name="P19" draw:layer="layout" svg:width="17.9cm" svg:height="1.955cm" svg:x="3.385cm" svg:y="1.169cm">
          <text:p text:style-name="P18"><text:span text:style-name="T8">Future Scop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8" draw:style-name="gr28" draw:text-style-name="P17" draw:layer="layout" svg:width="25.595cm" svg:height="11.88cm" svg:x="3.385cm" svg:y="3.394cm">
          <text:list text:style-name="L11">
            <text:list-item>
              <text:p text:style-name="P16"><text:span text:style-name="T22">The system can be integrated with government agricultural portals and Kisan Call Centers for real-time advisory delivery. </text:span></text:p>
            </text:list-item>
            <text:list-item>
              <text:p text:style-name="P16"><text:span text:style-name="T22">The disease-detection module can be expanded with a full CNN trained on field-collected image datasets for higher accuracy. </text:span></text:p>
            </text:list-item>
            <text:list-item>
              <text:p text:style-name="P16"><text:span text:style-name="T22">Real-time weather-API integration can enable dynamic, season-aware crop recommendations. </text:span></text:p>
            </text:list-item>
            <text:list-item>
              <text:p text:style-name="P16"><text:span text:style-name="T22">Advanced AI models in IBM watsonx.ai can be used to continuously improve prediction accuracy as more field data becomes available. </text:span></text:p>
            </text:list-item>
            <text:list-item>
              <text:p text:style-name="P16"><text:span text:style-name="T22">The solution can be scaled nationwide with regional crop-calendar and market-price overlays to support faster, transparent, data-driven farm advis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8" draw:style-name="gr29" draw:text-style-name="P21" draw:layer="layout" svg:width="20.745cm" svg:height="2.127cm" svg:x="3.385cm" svg:y="9.334cm">
          <text:p text:style-name="P20"><text:span text:style-name="T19">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18" draw:style-name="gr30" draw:text-style-name="P21" draw:layer="layout" svg:width="20.745cm" svg:height="2.127cm" svg:x="3.385cm" svg:y="12.21cm">
          <text:p text:style-name="P20"><text:span text:style-name="T19">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18" draw:style-name="gr31" draw:text-style-name="P21" draw:layer="layout" svg:width="20.745cm" svg:height="1.063cm" svg:x="3.385cm" svg:y="15.085cm">
          <text:p text:style-name="P20"><text:span text:style-name="T19">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72;p18:notes" presentation:style-name="pr13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3;p18:notes" draw:style-name="gr1" draw:layer="layout" svg:width="16.932cm" svg:height="9.524cm" svg:x="1.058cm" svg:y="1.905cm" draw:page-number="14" presentation:class="page"/>
        </presentation:notes>
      </draw:page>
      <draw:page draw:name="page15" draw:style-name="dp1" draw:master-page-name="SECTION_5f_HEADER">
        <draw:custom-shape draw:name="TextBox 5" draw:style-name="gr32" draw:text-style-name="P13" draw:layer="layout" svg:width="16.932cm" svg:height="1.861cm" svg:x="0.911cm" svg:y="0.576cm">
          <text:p text:style-name="P14"><text:span text:style-name="T8">Certificates Earne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3" draw:text-style-name="P13" draw:layer="layout" svg:width="17.749cm" svg:height="1.438cm" svg:x="1.533cm" svg:y="1.917cm">
          <text:p text:style-name="P14"><text:span text:style-name="T23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2" draw:layer="layout" svg:width="24.651cm" svg:height="16.119cm" svg:x="4.635cm" svg:y="2.437cm">
          <draw:image xlink:href="Pictures/1001254600018C000001320026A969509AD534A2.pdf" xlink:type="simple" xlink:show="embed" xlink:actuate="onLoad" draw:mime-type="application/pdf">
            <text:p/>
          </draw:image>
          <draw:image xlink:href="Pictures/10000001000004200000033013D3DEA2751B99B9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ECTION_5f_HEADER">
        <draw:custom-shape draw:name="TextBox 4" draw:style-name="gr35" draw:text-style-name="P13" draw:layer="layout" svg:width="16.932cm" svg:height="1.861cm" svg:x="0.491cm" svg:y="0.629cm">
          <text:p text:style-name="P14"><text:span text:style-name="T8">Certificates Earned:</text:span><text:span text:style-name="T24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6" draw:text-style-name="P13" draw:layer="layout" svg:width="15.104cm" svg:height="1.1cm" svg:x="1.38cm" svg:y="2.224cm">
          <text:p text:style-name="P14"><text:span text:style-name="T12">Add your IBM BOB Certif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2" draw:layer="layout" svg:width="26.952cm" svg:height="15.169cm" svg:x="4cm" svg:y="3.881cm">
          <draw:image xlink:href="Pictures/10005C740001A4C00001296000E5BD2F2AF88E82.pdf" xlink:type="simple" xlink:show="embed" xlink:actuate="onLoad" draw:mime-type="application/pdf">
            <text:p/>
          </draw:image>
          <draw:image xlink:href="Pictures/100000010000046200000319A634A927ACA64AEE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BJECT" presentation:presentation-page-layout-name="AL1T11">
        <draw:frame draw:name="Google Shape;310;p20" draw:style-name="gr4" draw:text-style-name="P11" draw:layer="layout" svg:width="33.866cm" svg:height="6.881cm" svg:x="0cm" svg:y="6.084cm">
          <draw:image xlink:href="Pictures/100000010000084E000001B0BF2304C067D065B7.png" xlink:type="simple" xlink:show="embed" xlink:actuate="onLoad" draw:mime-type="image/png">
            <text:p/>
          </draw:image>
        </draw:frame>
        <presentation:notes draw:style-name="dp3">
          <draw:frame draw:name="Google Shape;304;p20:notes" presentation:style-name="pr14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5;p20:notes" draw:style-name="gr1" draw:layer="layout" svg:width="16.932cm" svg:height="9.524cm" svg:x="1.058cm" svg:y="1.905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frame draw:name="Google Shape;24;p24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5;p24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26;p24" presentation:style-name="Mpr1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7;p24" presentation:style-name="Mpr1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8;p24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8;p2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2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23" presentation:style-name="Mpr4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1;p23" presentation:style-name="Mpr4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2;p2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anda Anirudh</meta:initial-creator>
    <meta:editing-cycles>2</meta:editing-cycles>
    <meta:creation-date>2025-07-08T05:06:56</meta:creation-date>
    <dc:date>2026-07-14T11:50:03.715145569</dc:date>
    <meta:generator>LibreOffice/7.3.7.2$Linux_X86_64 LibreOffice_project/30$Build-2</meta:generator>
    <meta:editing-duration>PT3M52S</meta:editing-duration>
    <meta:document-statistic meta:object-count="112"/>
    <meta:user-defined meta:name="AppVersion">16.0000</meta:user-defined>
    <meta:user-defined meta:name="Notes" meta:value-type="float">11</meta:user-defined>
    <meta:user-defined meta:name="PresentationFormat">Widescreen</meta:user-defined>
    <meta:user-defined meta:name="Slides" meta:value-type="float">15</meta:user-defined>
  </office:meta>
</office:document-meta>
</file>